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59BF407F608.png" manifest:media-type="image/png"/>
  <manifest:file-entry manifest:full-path="Pictures/10000001000001D6000004026E6EF508.png" manifest:media-type="image/png"/>
  <manifest:file-entry manifest:full-path="Pictures/10000001000001D600000402AEC24C11.png" manifest:media-type="image/png"/>
  <manifest:file-entry manifest:full-path="Pictures/10000001000001D6000004028409D2BC.png" manifest:media-type="image/png"/>
  <manifest:file-entry manifest:full-path="Pictures/10000001000001D6000004024EA15E49.png" manifest:media-type="image/png"/>
  <manifest:file-entry manifest:full-path="Pictures/10000001000001D6000004027EE2BC46.png" manifest:media-type="image/png"/>
  <manifest:file-entry manifest:full-path="Pictures/10000001000001D600000402319DC4AF.png" manifest:media-type="image/png"/>
  <manifest:file-entry manifest:full-path="Pictures/10000001000001D600000402B2C3EA18.png" manifest:media-type="image/png"/>
  <manifest:file-entry manifest:full-path="Pictures/10000001000001D600000402AB596B25.png" manifest:media-type="image/png"/>
  <manifest:file-entry manifest:full-path="Pictures/10000001000001D60000040213977830.png" manifest:media-type="image/png"/>
  <manifest:file-entry manifest:full-path="Pictures/10000001000001D60000040255AC7A47.png" manifest:media-type="image/png"/>
  <manifest:file-entry manifest:full-path="Pictures/10000001000001D600000402B13D18F1.png" manifest:media-type="image/png"/>
  <manifest:file-entry manifest:full-path="Pictures/10000001000001D600000402F59EAF63.png" manifest:media-type="image/png"/>
  <manifest:file-entry manifest:full-path="Pictures/10000001000001D60000077E540A7A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fo:font-weight="bold" officeooo:rsid="001da45b" officeooo:paragraph-rsid="001da45b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bold" officeooo:rsid="002af3f8" officeooo:paragraph-rsid="002af3f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24e649" officeooo:paragraph-rsid="0024e649" style:font-size-asian="10.5pt" style:font-weight-asian="bold" style:font-size-complex="12pt" style:font-weight-complex="bold"/>
    </style:style>
    <style:style style:name="P5" style:family="paragraph" style:parent-style-name="Footnote">
      <style:paragraph-properties fo:margin-left="0cm" fo:text-align="start" style:justify-single-word="false" fo:text-indent="0cm" style:auto-text-indent="false"/>
      <style:text-properties style:font-name="Arial" fo:font-size="12pt" officeooo:rsid="001e75aa" officeooo:paragraph-rsid="001e75aa" style:font-size-asian="10.5pt" style:font-size-complex="12pt"/>
    </style:style>
    <style:style style:name="P6" style:family="paragraph" style:parent-style-name="Text_20_body">
      <style:text-properties style:font-name="Arial" officeooo:rsid="001a14eb" officeooo:paragraph-rsid="001bd897"/>
    </style:style>
    <style:style style:name="P7" style:family="paragraph" style:parent-style-name="Text_20_body">
      <style:text-properties style:font-name="Arial" fo:font-weight="normal" officeooo:rsid="0012ed47" officeooo:paragraph-rsid="001bd897" style:font-weight-asian="normal" style:font-weight-complex="normal"/>
    </style:style>
    <style:style style:name="P8" style:family="paragraph" style:parent-style-name="Text_20_body">
      <style:text-properties style:font-name="Arial" officeooo:rsid="0056142d" officeooo:paragraph-rsid="0056142d"/>
    </style:style>
    <style:style style:name="P9" style:family="paragraph" style:parent-style-name="Footnote">
      <style:paragraph-properties fo:text-align="end" style:justify-single-word="false"/>
      <style:text-properties style:font-name="Arial" officeooo:rsid="001e75aa" officeooo:paragraph-rsid="001e75aa"/>
    </style:style>
    <style:style style:name="P10" style:family="paragraph" style:parent-style-name="Text_20_body">
      <style:text-properties style:font-name="Arial" fo:font-style="normal" officeooo:rsid="00147b65" style:font-style-asian="normal" style:font-style-complex="normal"/>
    </style:style>
    <style:style style:name="P11" style:family="paragraph" style:parent-style-name="Footnote">
      <style:paragraph-properties fo:text-align="end" style:justify-single-word="false"/>
      <style:text-properties style:font-name="Arial"/>
    </style:style>
    <style:style style:name="P12" style:family="paragraph" style:parent-style-name="Text_20_body">
      <style:text-properties style:font-name="Arial" officeooo:rsid="001bd897" officeooo:paragraph-rsid="002aa693"/>
    </style:style>
    <style:style style:name="P13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d9a5f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9a95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ac644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Arial" fo:font-weight="bold" officeooo:rsid="004d9a5f" officeooo:paragraph-rsid="004d9a5f" style:font-weight-asian="bold" style:font-weight-complex="bold"/>
    </style:style>
    <style:style style:name="P17" style:family="paragraph" style:parent-style-name="Standard">
      <style:text-properties officeooo:paragraph-rsid="0037ae48"/>
    </style:style>
    <style:style style:name="P18" style:family="paragraph" style:parent-style-name="Text_20_body">
      <style:text-properties style:font-name="MathJax_SansSerif" fo:font-weight="normal" officeooo:rsid="0012ed47" officeooo:paragraph-rsid="001bd897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officeooo:paragraph-rsid="001c35cd"/>
    </style:style>
    <style:style style:name="P20" style:family="paragraph" style:parent-style-name="Text_20_body">
      <style:paragraph-properties fo:text-align="start" style:justify-single-word="false"/>
      <style:text-properties officeooo:paragraph-rsid="0049a95d"/>
    </style:style>
    <style:style style:name="P21" style:family="paragraph" style:parent-style-name="Text_20_body">
      <style:paragraph-properties fo:text-align="start" style:justify-single-word="false"/>
      <style:text-properties officeooo:paragraph-rsid="004ac644"/>
    </style:style>
    <style:style style:name="P22" style:family="paragraph" style:parent-style-name="Text_20_body">
      <style:paragraph-properties fo:text-align="end" style:justify-single-word="false"/>
      <style:text-properties officeooo:paragraph-rsid="0049a95d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20pt" officeooo:paragraph-rsid="001da45b" style:font-size-asian="20pt" style:font-size-complex="20pt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094770" officeooo:paragraph-rsid="00094770"/>
    </style:style>
    <style:style style:name="P26" style:family="paragraph" style:parent-style-name="Heading_20_2">
      <style:text-properties officeooo:rsid="001a14eb" officeooo:paragraph-rsid="001a14eb"/>
    </style:style>
    <style:style style:name="P27" style:family="paragraph" style:parent-style-name="Heading_20_2">
      <style:text-properties officeooo:paragraph-rsid="001c35cd"/>
    </style:style>
    <style:style style:name="P28" style:family="paragraph" style:parent-style-name="Heading_20_3">
      <style:text-properties style:font-name="Arial" officeooo:paragraph-rsid="000afb1c"/>
    </style:style>
    <style:style style:name="P29" style:family="paragraph" style:parent-style-name="Heading_20_3">
      <style:text-properties style:font-name="Arial" officeooo:paragraph-rsid="0007f0ba"/>
    </style:style>
    <style:style style:name="P30" style:family="paragraph" style:parent-style-name="Heading_20_3">
      <style:text-properties style:font-name="Arial" officeooo:paragraph-rsid="00093b6a"/>
    </style:style>
    <style:style style:name="P31" style:family="paragraph" style:parent-style-name="Heading_20_3">
      <style:text-properties style:font-name="Arial"/>
    </style:style>
    <style:style style:name="P32" style:family="paragraph" style:parent-style-name="Heading_20_3">
      <style:text-properties style:font-name="Arial" officeooo:rsid="000aac85" officeooo:paragraph-rsid="000aac85"/>
    </style:style>
    <style:style style:name="P33" style:family="paragraph" style:parent-style-name="Heading_20_3">
      <style:text-properties style:font-name="Arial" officeooo:rsid="000aac85" officeooo:paragraph-rsid="000afb1c"/>
    </style:style>
    <style:style style:name="P34" style:family="paragraph" style:parent-style-name="Heading_20_3">
      <style:text-properties style:font-name="Arial" officeooo:paragraph-rsid="000bb5fd"/>
    </style:style>
    <style:style style:name="P35" style:family="paragraph" style:parent-style-name="Heading_20_3">
      <style:text-properties style:font-name="Arial" officeooo:paragraph-rsid="001bd897"/>
    </style:style>
    <style:style style:name="P36" style:family="paragraph" style:parent-style-name="Heading_20_3">
      <style:text-properties style:font-name="Arial" officeooo:rsid="00315864" officeooo:paragraph-rsid="0049a95d"/>
    </style:style>
    <style:style style:name="P37" style:family="paragraph" style:parent-style-name="Heading_20_3">
      <style:text-properties style:font-name="Arial" fo:font-weight="bold" officeooo:rsid="00315864" officeooo:paragraph-rsid="0049a95d" style:font-weight-asian="bold" style:font-weight-complex="bold"/>
    </style:style>
    <style:style style:name="P38" style:family="paragraph" style:parent-style-name="Heading_20_3">
      <style:text-properties officeooo:paragraph-rsid="001bd897"/>
    </style:style>
    <style:style style:name="P39" style:family="paragraph" style:parent-style-name="Heading_20_4">
      <style:text-properties style:font-name="Arial"/>
    </style:style>
    <style:style style:name="P40" style:family="paragraph" style:parent-style-name="Heading_20_5">
      <style:text-properties style:font-name="Arial"/>
    </style:style>
    <style:style style:name="P41" style:family="paragraph" style:parent-style-name="Heading_20_5">
      <style:text-properties officeooo:paragraph-rsid="00167ab2"/>
    </style:style>
    <style:style style:name="P42" style:family="paragraph" style:parent-style-name="Standard" style:list-style-name="L2">
      <style:paragraph-properties fo:line-height="115%"/>
      <style:text-properties style:font-name="Arial" fo:font-size="12pt" fo:font-weight="bold" officeooo:rsid="0036781a" officeooo:paragraph-rsid="0036781a" style:font-size-asian="12pt" style:font-weight-asian="bold" style:font-size-complex="12pt" style:font-weight-complex="bold"/>
    </style:style>
    <style:style style:name="P43" style:family="paragraph" style:parent-style-name="Standard" style:list-style-name="L2">
      <style:paragraph-properties fo:line-height="150%"/>
      <style:text-properties style:font-name="Arial" fo:font-size="12pt" fo:font-weight="bold" officeooo:rsid="00065717" officeooo:paragraph-rsid="0007f0ba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50%"/>
      <style:text-properties style:font-name="Arial" fo:font-size="12pt" fo:font-weight="bold" officeooo:rsid="0004ba11" officeooo:paragraph-rsid="0007f0ba" style:font-size-asian="12pt" style:font-weight-asian="bold" style:font-size-complex="12pt" style:font-weight-complex="bold"/>
    </style:style>
    <style:style style:name="P45" style:family="paragraph" style:parent-style-name="Text_20_body" style:list-style-name="L1">
      <style:paragraph-properties fo:line-height="100%"/>
      <style:text-properties style:font-name="Arial" fo:font-size="12pt" officeooo:rsid="00065717" officeooo:paragraph-rsid="00167ab2" style:font-size-asian="12pt" style:font-size-complex="12pt"/>
    </style:style>
    <style:style style:name="P46" style:family="paragraph" style:parent-style-name="Text_20_body" style:list-style-name="L4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7" style:family="paragraph" style:parent-style-name="Text_20_body" style:list-style-name="L5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8" style:family="paragraph" style:parent-style-name="Text_20_body" style:list-style-name="L3">
      <style:text-properties style:font-name="Arial" officeooo:rsid="001a14eb" officeooo:paragraph-rsid="001a14eb"/>
    </style:style>
    <style:style style:name="P49" style:family="paragraph" style:parent-style-name="Text_20_body" style:list-style-name="L6">
      <style:paragraph-properties fo:line-height="100%"/>
      <style:text-properties style:font-name="Arial" officeooo:rsid="0007f0ba" officeooo:paragraph-rsid="0007f0ba"/>
    </style:style>
    <style:style style:name="P50" style:family="paragraph" style:parent-style-name="Text_20_body" style:list-style-name="L7">
      <style:paragraph-properties fo:line-height="100%"/>
      <style:text-properties style:font-name="Arial" officeooo:rsid="0007f0ba" officeooo:paragraph-rsid="00453213"/>
    </style:style>
    <style:style style:name="P51" style:family="paragraph" style:parent-style-name="Text_20_body" style:list-style-name="L7">
      <style:paragraph-properties fo:line-height="100%"/>
      <style:text-properties style:font-name="Arial" officeooo:rsid="0007f0ba" officeooo:paragraph-rsid="00094770"/>
    </style:style>
    <style:style style:name="P52" style:family="paragraph" style:parent-style-name="Text_20_body" style:list-style-name="L6">
      <style:paragraph-properties fo:line-height="100%"/>
      <style:text-properties style:font-name="Arial" officeooo:rsid="00093b6a" officeooo:paragraph-rsid="00093b6a"/>
    </style:style>
    <style:style style:name="P53" style:family="paragraph" style:parent-style-name="Text_20_body" style:list-style-name="L7">
      <style:paragraph-properties fo:line-height="100%"/>
      <style:text-properties style:font-name="Arial" officeooo:rsid="00093b6a" officeooo:paragraph-rsid="00093b6a"/>
    </style:style>
    <style:style style:name="P54" style:family="paragraph" style:parent-style-name="Text_20_body" style:list-style-name="L7">
      <style:paragraph-properties fo:line-height="100%"/>
      <style:text-properties style:font-name="Arial" officeooo:rsid="00093b6a" officeooo:paragraph-rsid="00094770"/>
    </style:style>
    <style:style style:name="P55" style:family="paragraph" style:parent-style-name="Text_20_body" style:list-style-name="L7">
      <style:paragraph-properties fo:line-height="100%"/>
      <style:text-properties style:font-name="Arial" officeooo:rsid="00094770" officeooo:paragraph-rsid="00094770"/>
    </style:style>
    <style:style style:name="P56" style:family="paragraph" style:parent-style-name="Text_20_body" style:list-style-name="L8">
      <style:text-properties style:font-name="Arial" officeooo:rsid="000aac85" officeooo:paragraph-rsid="000aac85"/>
    </style:style>
    <style:style style:name="P57" style:family="paragraph" style:parent-style-name="Text_20_body" style:list-style-name="L8">
      <style:text-properties style:font-name="Arial" officeooo:rsid="000aac85" officeooo:paragraph-rsid="000afb1c"/>
    </style:style>
    <style:style style:name="P58" style:family="paragraph" style:parent-style-name="Text_20_body" style:list-style-name="L8">
      <style:text-properties style:font-name="Arial" officeooo:rsid="000aac85" officeooo:paragraph-rsid="000bb5fd"/>
    </style:style>
    <style:style style:name="P59" style:family="paragraph" style:parent-style-name="Text_20_body" style:list-style-name="L14">
      <style:text-properties style:font-name="Arial" officeooo:rsid="000aac85" officeooo:paragraph-rsid="000bb5fd"/>
    </style:style>
    <style:style style:name="P60" style:family="paragraph" style:parent-style-name="Text_20_body" style:list-style-name="L8">
      <style:text-properties style:font-name="Arial" officeooo:rsid="000afb1c" officeooo:paragraph-rsid="000aac85"/>
    </style:style>
    <style:style style:name="P61" style:family="paragraph" style:parent-style-name="Text_20_body" style:list-style-name="L8">
      <style:text-properties style:font-name="Arial" officeooo:rsid="000afb1c" officeooo:paragraph-rsid="000afb1c"/>
    </style:style>
    <style:style style:name="P62" style:family="paragraph" style:parent-style-name="Text_20_body" style:list-style-name="L8">
      <style:text-properties style:font-name="Arial" officeooo:rsid="000afb1c" officeooo:paragraph-rsid="000bb5fd"/>
    </style:style>
    <style:style style:name="P63" style:family="paragraph" style:parent-style-name="Text_20_body" style:list-style-name="L14">
      <style:text-properties style:font-name="Arial" officeooo:rsid="000afb1c" officeooo:paragraph-rsid="000bb5fd"/>
    </style:style>
    <style:style style:name="P64" style:family="paragraph" style:parent-style-name="Text_20_body" style:list-style-name="L9">
      <style:text-properties style:font-name="Arial" fo:font-weight="normal" officeooo:rsid="000afb1c" officeooo:paragraph-rsid="000afb1c" style:font-weight-asian="normal" style:font-weight-complex="normal"/>
    </style:style>
    <style:style style:name="P65" style:family="paragraph" style:parent-style-name="Text_20_body" style:list-style-name="L11">
      <style:text-properties style:font-name="Arial" fo:font-weight="normal" officeooo:rsid="000afb1c" officeooo:paragraph-rsid="000bb5fd" style:font-weight-asian="normal" style:font-weight-complex="normal"/>
    </style:style>
    <style:style style:name="P66" style:family="paragraph" style:parent-style-name="Text_20_body" style:list-style-name="L15">
      <style:text-properties style:font-name="Arial" fo:font-weight="normal" officeooo:rsid="000afb1c" officeooo:paragraph-rsid="000bb5fd" style:font-weight-asian="normal" style:font-weight-complex="normal"/>
    </style:style>
    <style:style style:name="P67" style:family="paragraph" style:parent-style-name="Text_20_body" style:list-style-name="L10">
      <style:text-properties style:font-name="Arial" fo:font-weight="normal" officeooo:rsid="000cbd32" officeooo:paragraph-rsid="000cbd32" style:font-weight-asian="normal" style:font-weight-complex="normal"/>
    </style:style>
    <style:style style:name="P68" style:family="paragraph" style:parent-style-name="Text_20_body" style:list-style-name="L12">
      <style:text-properties style:font-name="Arial" fo:font-weight="normal" officeooo:rsid="000cbd32" officeooo:paragraph-rsid="000cbd32" style:font-weight-asian="normal" style:font-weight-complex="normal"/>
    </style:style>
    <style:style style:name="P69" style:family="paragraph" style:parent-style-name="Text_20_body" style:list-style-name="L16">
      <style:text-properties style:font-name="Arial" fo:font-weight="normal" officeooo:rsid="000cbd32" officeooo:paragraph-rsid="000cbd32" style:font-weight-asian="normal" style:font-weight-complex="normal"/>
    </style:style>
    <style:style style:name="P70" style:family="paragraph" style:parent-style-name="Text_20_body" style:list-style-name="L18">
      <style:text-properties style:font-name="Arial" fo:font-weight="normal" officeooo:rsid="001c35cd" officeooo:paragraph-rsid="001c35cd" style:font-weight-asian="normal" style:font-weight-complex="normal"/>
    </style:style>
    <style:style style:name="P71" style:family="paragraph" style:parent-style-name="Text_20_body" style:list-style-name="L13">
      <style:text-properties style:font-name="Arial" officeooo:rsid="00147b65" officeooo:paragraph-rsid="00147b65"/>
    </style:style>
    <style:style style:name="P72" style:family="paragraph" style:parent-style-name="Text_20_body" style:list-style-name="L13">
      <style:text-properties style:font-name="Arial" officeooo:rsid="00147b65" officeooo:paragraph-rsid="00167ab2"/>
    </style:style>
    <style:style style:name="P73" style:family="paragraph" style:parent-style-name="Text_20_body" style:list-style-name="L13">
      <style:text-properties style:font-name="Arial" officeooo:rsid="00147b65" officeooo:paragraph-rsid="0037ae48"/>
    </style:style>
    <style:style style:name="P74" style:family="paragraph" style:parent-style-name="Text_20_body" style:list-style-name="L13">
      <style:text-properties style:font-name="Arial" officeooo:rsid="00167ab2" officeooo:paragraph-rsid="00167ab2"/>
    </style:style>
    <style:style style:name="P75" style:family="paragraph" style:parent-style-name="Text_20_body" style:list-style-name="L13">
      <style:text-properties style:font-name="Arial" officeooo:rsid="00167ab2" officeooo:paragraph-rsid="0037ae48"/>
    </style:style>
    <style:style style:name="P76" style:family="paragraph" style:parent-style-name="Text_20_body" style:list-style-name="L13">
      <style:text-properties style:font-name="Arial" officeooo:rsid="0054a0ac" officeooo:paragraph-rsid="0054a0ac"/>
    </style:style>
    <style:style style:name="P77" style:family="paragraph" style:parent-style-name="Text_20_body" style:list-style-name="L13">
      <style:text-properties style:font-name="Arial" officeooo:rsid="005587fe" officeooo:paragraph-rsid="005587fe"/>
    </style:style>
    <style:style style:name="P78" style:family="paragraph" style:parent-style-name="Text_20_body" style:list-style-name="L13">
      <style:text-properties style:font-name="Arial" officeooo:rsid="0037ae48" officeooo:paragraph-rsid="0037ae48"/>
    </style:style>
    <style:style style:name="P79" style:family="paragraph" style:parent-style-name="Text_20_body" style:list-style-name="L13">
      <style:text-properties style:font-name="Arial" officeooo:rsid="00532c9c" officeooo:paragraph-rsid="00532c9c"/>
    </style:style>
    <style:style style:name="P80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ac644" style:font-weight-asian="bold" style:font-weight-complex="bold"/>
    </style:style>
    <style:style style:name="P81" style:family="paragraph" style:parent-style-name="Text_20_body">
      <style:paragraph-properties fo:text-align="start" style:justify-single-word="false" fo:break-before="page"/>
      <style:text-properties style:font-name="Arial" fo:font-weight="bold" officeooo:rsid="00315864" officeooo:paragraph-rsid="004ac644" style:font-weight-asian="bold" style:font-weight-complex="bold"/>
    </style:style>
    <style:style style:name="P82" style:family="paragraph" style:parent-style-name="Text_20_body" style:list-style-name="L13">
      <style:text-properties officeooo:paragraph-rsid="0037ae48"/>
    </style:style>
    <style:style style:name="P83" style:family="paragraph" style:parent-style-name="Text_20_body" style:list-style-name="L16">
      <style:text-properties officeooo:paragraph-rsid="000cbd32"/>
    </style:style>
    <style:style style:name="P84" style:family="paragraph" style:parent-style-name="Text_20_body" style:list-style-name="L17">
      <style:text-properties officeooo:paragraph-rsid="001c35cd"/>
    </style:style>
    <style:style style:name="P85" style:family="paragraph" style:parent-style-name="Text_20_body" style:list-style-name="L17">
      <style:text-properties officeooo:paragraph-rsid="002aa693"/>
    </style:style>
    <style:style style:name="P86" style:family="paragraph" style:parent-style-name="Text_20_body" style:list-style-name="L18"/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9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2ab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98eee" style:font-weight-asian="normal" style:font-weight-complex="normal"/>
    </style:style>
    <style:style style:name="T4" style:family="text">
      <style:text-properties fo:font-weight="normal" officeooo:rsid="00435d01" style:font-weight-asian="normal" style:font-weight-complex="normal"/>
    </style:style>
    <style:style style:name="T5" style:family="text">
      <style:text-properties fo:font-weight="normal" officeooo:rsid="0024e649" style:font-weight-asian="normal" style:font-weight-complex="normal"/>
    </style:style>
    <style:style style:name="T6" style:family="text">
      <style:text-properties fo:font-weight="normal" officeooo:rsid="0040bccf" style:font-weight-asian="normal" style:font-weight-complex="normal"/>
    </style:style>
    <style:style style:name="T7" style:family="text">
      <style:text-properties fo:font-weight="normal" officeooo:rsid="003f6054" style:font-weight-asian="normal" style:font-weight-complex="normal"/>
    </style:style>
    <style:style style:name="T8" style:family="text">
      <style:text-properties fo:font-weight="normal" officeooo:rsid="001a14eb" style:font-weight-asian="normal" style:font-weight-complex="normal"/>
    </style:style>
    <style:style style:name="T9" style:family="text">
      <style:text-properties fo:font-weight="normal" officeooo:rsid="00167ab2" style:font-weight-asian="normal" style:font-weight-complex="normal"/>
    </style:style>
    <style:style style:name="T10" style:family="text">
      <style:text-properties fo:font-weight="normal" officeooo:rsid="0012ed47" style:font-weight-asian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aac85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4ba11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781a" style:font-weight-asian="bold" style:font-weight-complex="bold"/>
    </style:style>
    <style:style style:name="T16" style:family="text">
      <style:text-properties officeooo:rsid="0001bd64"/>
    </style:style>
    <style:style style:name="T17" style:family="text">
      <style:text-properties officeooo:rsid="00167ab2"/>
    </style:style>
    <style:style style:name="T18" style:family="text">
      <style:text-properties officeooo:rsid="003e04d7"/>
    </style:style>
    <style:style style:name="T19" style:family="text">
      <style:text-properties officeooo:rsid="0036781a"/>
    </style:style>
    <style:style style:name="T20" style:family="text">
      <style:text-properties officeooo:rsid="000aac85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65717" style:font-size-asian="14pt" style:font-size-complex="14pt"/>
    </style:style>
    <style:style style:name="T23" style:family="text">
      <style:text-properties fo:font-size="14pt" officeooo:rsid="00398eee" style:font-size-asian="14pt" style:font-size-complex="14pt"/>
    </style:style>
    <style:style style:name="T24" style:family="text">
      <style:text-properties officeooo:rsid="00453213"/>
    </style:style>
    <style:style style:name="T25" style:family="text">
      <style:text-properties officeooo:rsid="0007f0ba"/>
    </style:style>
    <style:style style:name="T26" style:family="text">
      <style:text-properties officeooo:rsid="00093b6a"/>
    </style:style>
    <style:style style:name="T27" style:family="text">
      <style:text-properties officeooo:rsid="00094770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rial" fo:font-size="12pt" fo:font-style="normal" fo:font-weight="bold" officeooo:rsid="0045321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rial"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147b65" style:font-size-asian="10.5pt" style:font-style-asian="normal" style:font-size-complex="12pt" style:font-style-complex="normal"/>
    </style:style>
    <style:style style:name="T3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2aa693" style:font-size-asian="12pt" style:font-weight-asian="normal" style:font-size-complex="12pt" style:font-weight-complex="normal"/>
    </style:style>
    <style:style style:name="T36" style:family="text">
      <style:text-properties style:font-name="Arial" officeooo:rsid="0037ae48"/>
    </style:style>
    <style:style style:name="T37" style:family="text">
      <style:text-properties style:font-name="Arial" officeooo:rsid="00147b65"/>
    </style:style>
    <style:style style:name="T38" style:family="text">
      <style:text-properties style:font-name="Arial" fo:font-weight="bold" officeooo:rsid="0037ae48" style:font-weight-asian="bold" style:font-weight-complex="bold"/>
    </style:style>
    <style:style style:name="T39" style:family="text">
      <style:text-properties style:font-name="Arial" fo:font-weight="bold" officeooo:rsid="001c35cd" style:font-weight-asian="bold" style:font-weight-complex="bold"/>
    </style:style>
    <style:style style:name="T40" style:family="text">
      <style:text-properties style:font-name="Arial" fo:font-weight="bold" officeooo:rsid="001da45b" style:font-weight-asian="bold" style:font-weight-complex="bold"/>
    </style:style>
    <style:style style:name="T41" style:family="text">
      <style:text-properties style:font-name="Arial" fo:font-weight="bold" officeooo:rsid="00315864" style:font-weight-asian="bold" style:font-weight-complex="bold"/>
    </style:style>
    <style:style style:name="T42" style:family="text">
      <style:text-properties style:font-name="Arial" fo:font-weight="bold" officeooo:rsid="004ac644" style:font-weight-asian="bold" style:font-weight-complex="bold"/>
    </style:style>
    <style:style style:name="T43" style:family="text">
      <style:text-properties style:font-name="Arial" fo:font-weight="bold" officeooo:rsid="00349f01" style:font-weight-asian="bold" style:font-weight-complex="bold"/>
    </style:style>
    <style:style style:name="T44" style:family="text">
      <style:text-properties style:font-name="Arial" fo:font-weight="normal" officeooo:rsid="000cbd32" style:font-weight-asian="normal" style:font-weight-complex="normal"/>
    </style:style>
    <style:style style:name="T45" style:family="text">
      <style:text-properties style:font-name="Arial" fo:font-weight="normal" officeooo:rsid="001238e5" style:font-weight-asian="normal" style:font-weight-complex="normal"/>
    </style:style>
    <style:style style:name="T46" style:family="text">
      <style:text-properties style:font-name="Arial" fo:font-weight="normal" officeooo:rsid="0045167d" style:font-weight-asian="normal" style:font-weight-complex="normal"/>
    </style:style>
    <style:style style:name="T47" style:family="text">
      <style:text-properties style:font-name="Arial" fo:font-weight="normal" officeooo:rsid="001da45b" style:font-weight-asian="normal" style:font-weight-complex="normal"/>
    </style:style>
    <style:style style:name="T48" style:family="text">
      <style:text-properties style:font-name="Arial" fo:font-weight="normal" officeooo:rsid="002aa693" style:font-weight-asian="normal" style:font-weight-complex="normal"/>
    </style:style>
    <style:style style:name="T49" style:family="text">
      <style:text-properties style:font-name="Arial" fo:font-weight="normal" officeooo:rsid="001c35cd" style:font-weight-asian="normal" style:font-weight-complex="normal"/>
    </style:style>
    <style:style style:name="T50" style:family="text">
      <style:text-properties style:font-name="Arial" fo:font-style="normal" officeooo:rsid="00174b78" style:font-style-asian="normal" style:font-style-complex="normal"/>
    </style:style>
    <style:style style:name="T51" style:family="text">
      <style:text-properties style:font-name="Arial" fo:font-style="normal" officeooo:rsid="00147b65" style:font-style-asian="normal" style:font-style-complex="normal"/>
    </style:style>
    <style:style style:name="T52" style:family="text">
      <style:text-properties style:font-name="Arial" officeooo:rsid="001a343f"/>
    </style:style>
    <style:style style:name="T53" style:family="text">
      <style:text-properties style:font-name="Arial" officeooo:rsid="001a14eb"/>
    </style:style>
    <style:style style:name="T54" style:family="text">
      <style:text-properties style:font-name="Arial" officeooo:rsid="001c35cd"/>
    </style:style>
    <style:style style:name="T55" style:family="text">
      <style:text-properties style:font-name="Arial" officeooo:rsid="002aa693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0afb1c"/>
    </style:style>
    <style:style style:name="T59" style:family="text">
      <style:text-properties officeooo:rsid="000bb5fd"/>
    </style:style>
    <style:style style:name="T60" style:family="text">
      <style:text-properties officeooo:rsid="001238e5"/>
    </style:style>
    <style:style style:name="T61" style:family="text">
      <style:text-properties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officeooo:rsid="00147b65"/>
    </style:style>
    <style:style style:name="T65" style:family="text">
      <style:text-properties officeooo:rsid="004ef16e"/>
    </style:style>
    <style:style style:name="T66" style:family="text">
      <style:text-properties officeooo:rsid="0037ae48"/>
    </style:style>
    <style:style style:name="T67" style:family="text">
      <style:text-properties officeooo:rsid="0054a0ac"/>
    </style:style>
    <style:style style:name="T68" style:family="text">
      <style:text-properties officeooo:rsid="0056142d"/>
    </style:style>
    <style:style style:name="T69" style:family="text">
      <style:text-properties officeooo:rsid="00174b78"/>
    </style:style>
    <style:style style:name="T70" style:family="text">
      <style:text-properties officeooo:rsid="0018bfa0"/>
    </style:style>
    <style:style style:name="T71" style:family="text">
      <style:text-properties officeooo:rsid="001a14eb"/>
    </style:style>
    <style:style style:name="T72" style:family="text">
      <style:text-properties style:font-name="MathJax_SansSerif" fo:font-weight="bold" officeooo:rsid="0012ed47" style:font-weight-asian="bold" style:font-weight-complex="bold"/>
    </style:style>
    <style:style style:name="T73" style:family="text">
      <style:text-properties officeooo:rsid="002aa693"/>
    </style:style>
    <style:style style:name="T74" style:family="text">
      <style:text-properties officeooo:rsid="001c35cd"/>
    </style:style>
    <style:style style:name="T75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76" style:family="text">
      <style:text-properties fo:color="#000000" loext:opacity="100%" style:font-name="Arial" fo:font-size="12pt" fo:font-weight="bold" officeooo:rsid="001c35c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aa693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333333" loext:opacity="100%" fo:letter-spacing="normal"/>
    </style:style>
    <style:style style:name="T81" style:family="text">
      <style:text-properties style:text-position="super 58%" style:font-name="Arial" fo:font-weight="normal" officeooo:rsid="002aa693" style:font-weight-asian="normal" style:font-weight-complex="normal"/>
    </style:style>
    <style:style style:name="T82" style:family="text">
      <style:text-properties officeooo:rsid="002719ec"/>
    </style:style>
    <style:style style:name="T83" style:family="text">
      <style:text-properties officeooo:rsid="00570e8a"/>
    </style:style>
    <style:style style:name="T84" style:family="text">
      <style:text-properties officeooo:rsid="00315864"/>
    </style:style>
    <style:style style:name="T85" style:family="text">
      <style:text-properties style:font-name="Arial" fo:font-size="12pt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none" draw:fill-color="#ffffff" draw:textarea-vertical-align="middle" fo:min-height="0.695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draw:textarea-vertical-align="middle" fo:min-height="0.6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0.8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cahier de<text:span text:style-name="T1">s</text:span> charge<text:span text:style-name="T1">s</text:span></text:h>
      <text:p text:style-name="Horizontal_20_Line"/>
      <text:p text:style-name="P2">Nom de l’app : <text:span text:style-name="T3">CSM N</text:span><text:span text:style-name="T4">iangon</text:span><text:span text:style-name="T3"> <text:s text:c="59"/></text:span></text:p>
      <text:p text:style-name="P3">Logo : </text:p>
      <text:p text:style-name="P4">Description :</text:p>
      <text:p text:style-name="P2"><text:span text:style-name="T5">La plateforme du </text:span><text:span text:style-name="Strong_20_Emphasis"><text:span text:style-name="T5">CSM Niangon </text:span></text:span><text:span text:style-name="T5"><text:s/>est une application web développée par le </text:span><text:span text:style-name="Strong_20_Emphasis"><text:span text:style-name="T5">Club NTIC et Information du CSM Niangon</text:span></text:span><text:span text:style-name="T5">, destinée à </text:span><text:span text:style-name="Strong_20_Emphasis"><text:span text:style-name="T5">valoriser, centraliser et diffuser toutes les activités de l’établissement</text:span></text:span><text:span text:style-name="T5">.<text:line-break/>Elle sert de </text:span><text:span text:style-name="Strong_20_Emphasis"><text:span text:style-name="T5">média scolaire officiel</text:span></text:span><text:span text:style-name="T5">, </text:span><text:span text:style-name="T6">partageant</text:span><text:span text:style-name="T5"> l</text:span><text:span text:style-name="T6">es</text:span><text:span text:style-name="T5"> </text:span><text:span text:style-name="T6">informations,</text:span><text:span text:style-name="T5"> actualités, projets, interviews, reportages et événements qui rythment la vie du lycée.</text:span></text:p>
      <text:p text:style-name="Horizontal_20_Line"/>
      <text:h text:style-name="P24" text:outline-level="2" text:is-list-header="true"><text:span text:style-name="T12">1. </text:span><text:span text:style-name="T13">S</text:span><text:span text:style-name="T11">ections</text:span> </text:h>
      <text:list text:style-name="L1">
        <text:list-item>
          <text:p text:style-name="P45"><text:span text:style-name="T14">Page principale </text:span><text:span text:style-name="T2">(acceuil, </text:span><text:span text:style-name="T7">information, actu,</text:span><text:span text:style-name="T2"> article(s) à la une/populaire </text:span><text:span text:style-name="T8">selon le traffic</text:span><text:span text:style-name="T2"> </text:span><text:span text:style-name="T9">etc.</text:span><text:span text:style-name="T2">)</text:span></text:p>
        </text:list-item>
        <text:list-item>
          <text:p text:style-name="P45"><text:span text:style-name="T15">Actu</text:span><text:span text:style-name="T16"> (miniature, </text:span><text:span text:style-name="T17">vidéo/</text:span><text:span text:style-name="T18">image</text:span><text:span text:style-name="T17"> </text:span><text:span text:style-name="T19">(facultative)</text:span><text:span text:style-name="T16">, retranscription, résume ecrit </text:span><text:span text:style-name="T17">etc.</text:span><text:span text:style-name="T16">)</text:span></text:p>
        </text:list-item>
      </text:list>
      <text:list text:style-name="L2">
        <text:list-item>
          <text:p text:style-name="P42">Info</text:p>
        </text:list-item>
        <text:list-item>
          <text:p text:style-name="P43">Page de profil </text:p>
        </text:list-item>
        <text:list-item>
          <text:p text:style-name="P44">À propos de l’établissement</text:p>
        </text:list-item>
      </text:list>
      <text:p text:style-name="Horizontal_20_Line"/>
      <text:h text:style-name="P24" text:outline-level="2" text:is-list-header="true"><text:span text:style-name="T20">2. </text:span>Fonctionnalités</text:h>
      <text:list text:style-name="L3">
        <text:list-item>
          <text:p text:style-name="P48">Système de recherche</text:p>
        </text:list-item>
        <text:list-item>
          <text:p text:style-name="P48">Classifications des posts par tags et types de posts/contenu</text:p>
        </text:list-item>
      </text:list>
      <text:h text:style-name="P28" text:outline-level="3"><text:span text:style-name="T20"><text:tab/>a. </text:span><text:span text:style-name="T22">Fonctionnalités (</text:span><text:span text:style-name="T21">utilisateurs/</text:span><text:span text:style-name="T23">parents d’eleves</text:span><text:span text:style-name="T22">)</text:span></text:h>
      <text:list text:style-name="L4">
        <text:list-item>
          <text:p text:style-name="P46">Création de compte utilisateur <text:span text:style-name="T24">(facultative)</text:span></text:p>
        </text:list-item>
      </text:list>
      <text:list text:style-name="L5">
        <text:list-item>
          <text:p text:style-name="P47">Réaction aux publication<text:span text:style-name="T25">s (commenter, like)</text:span></text:p>
        </text:list-item>
      </text:list>
      <text:h text:style-name="P29" text:outline-level="3"><text:tab/><text:span text:style-name="T20">b. </text:span><text:span text:style-name="T25">Fonctionnalités (modérateurs)</text:span></text:h>
      <text:list text:style-name="L6">
        <text:list-item>
          <text:p text:style-name="P49">Création de compte modérateur via clé d’ac<text:span text:style-name="T26">cès </text:span><text:span text:style-name="T24">(obligatoire)</text:span></text:p>
        </text:list-item>
        <text:list-item>
          <text:p text:style-name="P49">Modér<text:span text:style-name="T27">ation</text:span> <text:span text:style-name="T27">d</text:span>es commentaires/<text:span text:style-name="T26">réaction</text:span></text:p>
        </text:list-item>
        <text:list-item>
          <text:p text:style-name="P52">Modification de profil (photo de profil, biographie)</text:p>
        </text:list-item>
      </text:list>
      <text:h text:style-name="P30" text:outline-level="3"><text:tab/><text:span text:style-name="T20">c. </text:span><text:span text:style-name="T25">Fonctionnalités (</text:span><text:span text:style-name="T26">rédacteurs</text:span><text:span text:style-name="T25">)</text:span></text:h>
      <text:list xml:id="list1550214222" text:style-name="L7">
        <text:list-item>
          <text:p text:style-name="P50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3"><text:soft-page-break/>Création de publications</text:p>
        </text:list-item>
        <text:list-item>
          <text:p text:style-name="P53">Modification de profil (photo de profil, biographie)</text:p>
        </text:list-item>
        <text:list-item>
          <text:p text:style-name="P55">Score de confiance</text:p>
        </text:list-item>
      </text:list>
      <text:h text:style-name="P31" text:outline-level="3"><text:span text:style-name="T25"><text:tab/></text:span><text:span text:style-name="T20">d. </text:span><text:span text:style-name="T25">Fonctionnalités (</text:span><text:span text:style-name="T27">admins</text:span><text:span text:style-name="T25">)</text:span></text:h>
      <text:list text:continue-numbering="true" text:style-name="L7">
        <text:list-item>
          <text:p text:style-name="P50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4">Création de publications</text:p>
        </text:list-item>
        <text:list-item>
          <text:p text:style-name="P54">Modification de profil (photo de profil, biographie)</text:p>
        </text:list-item>
        <text:list-item>
          <text:p text:style-name="P51">Modér<text:span text:style-name="T27">ation</text:span> <text:span text:style-name="T27">d</text:span>es commentaires/<text:span text:style-name="T26">réaction</text:span></text:p>
        </text:list-item>
        <text:list-item>
          <text:p text:style-name="P55">Accès aux analyses (nombres (d’utilisateurs, de vue des publications))</text:p>
        </text:list-item>
      </text:list>
      <text:p text:style-name="Horizontal_20_Line"/>
      <text:h text:style-name="P25" text:outline-level="2" text:is-list-header="true"><text:span text:style-name="T20">3. </text:span>User journey</text:h>
      <text:h text:style-name="P32" text:outline-level="3" text:is-list-header="true"><text:tab/>a. Utilisateurs</text:h>
      <text:h text:style-name="Heading_20_4" text:outline-level="4"><text:tab/><text:tab/><text:span text:style-name="T29">Création de compte </text:span><text:span text:style-name="T30">(facultative)</text:span> <text:span text:style-name="T56">: </text:span></text:h>
      <text:list xml:id="list4189458156" text:style-name="L8">
        <text:list-item>
          <text:p text:style-name="P56">Nom et prenom<text:span text:style-name="T58">*</text:span></text:p>
        </text:list-item>
        <text:list-item>
          <text:p text:style-name="P60">Nom d’utilisateur</text:p>
        </text:list-item>
        <text:list-item>
          <text:p text:style-name="P61">Classe</text:p>
        </text:list-item>
        <text:list-item>
          <text:p text:style-name="P56">Email<text:span text:style-name="T58">*</text:span></text:p>
        </text:list-item>
        <text:list-item>
          <text:p text:style-name="P61">Mots de passe*</text:p>
        </text:list-item>
      </text:list>
      <text:h text:style-name="Heading_20_4" text:outline-level="4"><text:tab/><text:tab/><text:span text:style-name="T29">Personnalisation du profil</text:span></text:h>
      <text:h text:style-name="P33" text:outline-level="3" text:is-list-header="true"><text:tab/><text:span text:style-name="T58">b</text:span>. <text:span text:style-name="T58">Modérateurs</text:span></text:h>
      <text:h text:style-name="Heading_20_4" text:outline-level="4"><text:tab/><text:tab/><text:span text:style-name="T29">Création de compte</text:span> <text:span text:style-name="T56">: </text:span></text:h>
      <text:list xml:id="list205349258684660" text:continue-numbering="true" text:style-name="L8">
        <text:list-item>
          <text:p text:style-name="P57">Nom et prenom<text:span text:style-name="T58">*</text:span></text:p>
        </text:list-item>
        <text:list-item>
          <text:p text:style-name="P57"><text:span text:style-name="T58">Nom d’utilisateur</text:span><text:span text:style-name="T59">*</text:span></text:p>
        </text:list-item>
        <text:list-item>
          <text:p text:style-name="P61">Classe*</text:p>
        </text:list-item>
        <text:list-item>
          <text:p text:style-name="P57">Email<text:span text:style-name="T58">*</text:span></text:p>
        </text:list-item>
        <text:list-item>
          <text:p text:style-name="P61">Mots de passe*</text:p>
        </text:list-item>
        <text:list-item>
          <text:p text:style-name="P61">Clé d’accès pour modérateurs<text:span text:style-name="T14">*</text:span></text:p>
        </text:list-item>
      </text:list>
      <text:h text:style-name="Heading_20_4" text:outline-level="4"><text:tab/><text:tab/><text:span text:style-name="T32">Personnalisation du profil</text:span> <text:span text:style-name="T57">:</text:span></text:h>
      <text:list text:style-name="L9">
        <text:list-item>
          <text:p text:style-name="P64">Photo de profil</text:p>
        </text:list-item>
        <text:list-item>
          <text:p text:style-name="P64"><text:soft-page-break/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6">:</text:span></text:h>
      <text:list text:style-name="L10">
        <text:list-item>
          <text:p text:style-name="P67">Email<text:span text:style-name="T60">*</text:span></text:p>
        </text:list-item>
        <text:list-item>
          <text:p text:style-name="P67">Mots de passe<text:span text:style-name="T60">*</text:span></text:p>
        </text:list-item>
        <text:list-item>
          <text:p text:style-name="P67">Clé d’accès<text:span text:style-name="T60">*</text:span></text:p>
        </text:list-item>
      </text:list>
      <text:h text:style-name="P31" text:outline-level="3"><text:tab/><text:span text:style-name="T59">c. Rédacteurs</text:span></text:h>
      <text:h text:style-name="Heading_20_4" text:outline-level="4"><text:span text:style-name="T14"><text:tab/><text:tab/></text:span><text:span text:style-name="T29">Création de compte</text:span><text:span text:style-name="T57"> </text:span><text:span text:style-name="T56">:</text:span><text:span text:style-name="T14"> </text:span></text:h>
      <text:list text:continue-list="list205349258684660" text:style-name="L8">
        <text:list-item>
          <text:p text:style-name="P58">Nom et prenom<text:span text:style-name="T58">*</text:span></text:p>
        </text:list-item>
        <text:list-item>
          <text:p text:style-name="P58"><text:span text:style-name="T58">Nom d’utilisateur</text:span><text:span text:style-name="T59">*</text:span></text:p>
        </text:list-item>
        <text:list-item>
          <text:p text:style-name="P62">Classe*</text:p>
        </text:list-item>
        <text:list-item>
          <text:p text:style-name="P58">Email<text:span text:style-name="T58">*</text:span></text:p>
        </text:list-item>
        <text:list-item>
          <text:p text:style-name="P62">Mots de passe*</text:p>
        </text:list-item>
        <text:list-item>
          <text:p text:style-name="P62">Clé d’accès pour <text:span text:style-name="T59">rédacteurs</text:span><text:span text:style-name="T14">*</text:span></text:p>
        </text:list-item>
      </text:list>
      <text:h text:style-name="P39" text:outline-level="4"><text:tab/><text:span text:style-name="T61"><text:tab/>Personnalisation du profil</text:span><text:span text:style-name="T57"> :</text:span></text:h>
      <text:list text:style-name="L11">
        <text:list-item>
          <text:p text:style-name="P65">Photo de profil</text:p>
        </text:list-item>
        <text:list-item>
          <text:p text:style-name="P65"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6">:</text:span></text:h>
      <text:list text:style-name="L12">
        <text:list-item>
          <text:p text:style-name="P68">Email<text:span text:style-name="T60">*</text:span></text:p>
        </text:list-item>
        <text:list-item>
          <text:p text:style-name="P68">Mots de passe<text:span text:style-name="T60">*</text:span></text:p>
        </text:list-item>
        <text:list-item>
          <text:p text:style-name="P68">Clé d’accès<text:span text:style-name="T60">*</text:span></text:p>
        </text:list-item>
      </text:list>
      <text:h text:style-name="Heading_20_4" text:outline-level="4"><text:tab/><text:tab/><text:span text:style-name="T33">Publication :</text:span></text:h>
      <text:h text:style-name="P40" text:outline-level="5"><text:tab/><text:tab/><text:tab/><text:span text:style-name="T64">Articles </text:span><text:span text:style-name="T65">(compté dans actu)</text:span><text:span text:style-name="T64"> :</text:span></text:h>
      <text:list xml:id="list2179094296" text:style-name="L13">
        <text:list-item>
          <text:p text:style-name="P71">Images d’illustration</text:p>
        </text:list-item>
        <text:list-item>
          <text:p text:style-name="P71">Rédaction du contenu/texte de l’article</text:p>
        </text:list-item>
        <text:list-item>
          <text:p text:style-name="P71">Rédaction du résumé</text:p>
        </text:list-item>
        <text:list-item>
          <text:p text:style-name="P71"><text:span text:style-name="T66">Sources des </text:span>info<text:span text:style-name="T66">s</text:span> (facultative)</text:p>
        </text:list-item>
      </text:list>
      <text:h text:style-name="P41" text:outline-level="5"><text:tab/><text:tab/><text:tab/><text:span text:style-name="T36">Actu</text:span><text:span text:style-name="T37"> :</text:span></text:h>
      <text:list text:continue-numbering="true" text:style-name="L13">
        <text:list-item>
          <text:p text:style-name="P74">Miniature</text:p>
        </text:list-item>
        <text:list-item>
          <text:p text:style-name="P74"><text:span text:style-name="T66">Vid</text:span><text:span text:style-name="T67">éo </text:span>youtube <text:span text:style-name="T67">(facultative)</text:span></text:p>
        </text:list-item>
        <text:list-item>
          <text:p text:style-name="P76"><text:soft-page-break/>Image</text:p>
        </text:list-item>
        <text:list-item>
          <text:p text:style-name="P72">Rédaction d<text:span text:style-name="T17">e la description</text:span></text:p>
        </text:list-item>
        <text:list-item>
          <text:p text:style-name="P77">Rédaction du contenu</text:p>
        </text:list-item>
        <text:list-item>
          <text:p text:style-name="P72">Rédaction du résumé <text:span text:style-name="T68">(En markdown)</text:span></text:p>
        </text:list-item>
        <text:list-item>
          <text:p text:style-name="P82"><text:span text:style-name="T36">Sources des </text:span><text:span text:style-name="T37">info</text:span><text:span text:style-name="T36">s</text:span><text:span text:style-name="T37"> (facultative)</text:span></text:p>
        </text:list-item>
      </text:list>
      <text:p text:style-name="P17"><text:span text:style-name="T36"><text:tab/><text:tab/><text:tab/></text:span><text:span text:style-name="T38">Infos</text:span><text:span text:style-name="T37"> :</text:span></text:p>
      <text:list text:continue-numbering="true" text:style-name="L13">
        <text:list-item>
          <text:p text:style-name="P75">Miniature</text:p>
        </text:list-item>
        <text:list-item>
          <text:p text:style-name="P78">Image de fiche (flyer ou prospectus)</text:p>
        </text:list-item>
        <text:list-item>
          <text:p text:style-name="P73">Rédaction d<text:span text:style-name="T17">e la description</text:span></text:p>
        </text:list-item>
        <text:list-item>
          <text:p text:style-name="P79">Contenu de l’information</text:p>
        </text:list-item>
        <text:list-item>
          <text:p text:style-name="P79">Pour information urgente (Petite redaction/résumé direct de l’info qui passera en bande deroulante dans la page d’acceuil)</text:p>
        </text:list-item>
      </text:list>
      <text:p text:style-name="P8">La rédaction du contenu est en markdown et le redacteur peut voir le rendu avant la publication,</text:p>
      <text:p text:style-name="P9">peut uniquement supprimer ses propres publications</text:p>
      <text:p text:style-name="P5">À accès à ses données (les publications, nombre de j’aime et vue) depuis sa page de profil (les utilisateurs aussi peuvent les voir)</text:p>
      <text:h text:style-name="P34" text:outline-level="3"><text:tab/><text:span text:style-name="T59">d. Admins</text:span></text:h>
      <text:h text:style-name="Heading_20_4" text:outline-level="4"><text:span text:style-name="T14"><text:tab/><text:tab/></text:span><text:span text:style-name="T29">Création de compte</text:span><text:span text:style-name="T32"> </text:span><text:span text:style-name="T29">:</text:span><text:span text:style-name="T14"> </text:span></text:h>
      <text:list text:style-name="L14">
        <text:list-item>
          <text:p text:style-name="P59">Nom et prenom<text:span text:style-name="T58">*</text:span></text:p>
        </text:list-item>
        <text:list-item>
          <text:p text:style-name="P59"><text:span text:style-name="T58">Nom d’utilisateur</text:span><text:span text:style-name="T59">*</text:span></text:p>
        </text:list-item>
        <text:list-item>
          <text:p text:style-name="P63">Classe*</text:p>
        </text:list-item>
        <text:list-item>
          <text:p text:style-name="P59">Email<text:span text:style-name="T58">*</text:span></text:p>
        </text:list-item>
        <text:list-item>
          <text:p text:style-name="P63">Mots de passe*</text:p>
        </text:list-item>
        <text:list-item>
          <text:p text:style-name="P63">Clé d’accès pour <text:span text:style-name="T59">admins</text:span><text:span text:style-name="T14">*</text:span></text:p>
        </text:list-item>
      </text:list>
      <text:h text:style-name="Heading_20_4" text:outline-level="4"><text:tab/><text:tab/><text:span text:style-name="T32">Personnalisation du profil :</text:span></text:h>
      <text:list text:style-name="L15">
        <text:list-item>
          <text:p text:style-name="P66">Photo de profil</text:p>
        </text:list-item>
        <text:list-item>
          <text:p text:style-name="P66">Biographie*</text:p>
        </text:list-item>
      </text:list>
      <text:h text:style-name="Heading_20_4" text:outline-level="4"><text:tab/><text:tab/><text:span text:style-name="T62">C</text:span><text:span text:style-name="T63">onnexion</text:span><text:span text:style-name="T61"> </text:span><text:span text:style-name="T62">:</text:span></text:h>
      <text:list text:style-name="L16">
        <text:list-item>
          <text:p text:style-name="P69">Email<text:span text:style-name="T60">*</text:span></text:p>
        </text:list-item>
        <text:list-item>
          <text:p text:style-name="P69">Mots de passe<text:span text:style-name="T60">*</text:span></text:p>
        </text:list-item>
        <text:list-item>
          <text:p text:style-name="P83"><text:span text:style-name="T44">Clé d’accès</text:span><text:span text:style-name="T45">*</text:span></text:p>
        </text:list-item>
      </text:list>
      <text:h text:style-name="Heading_20_4" text:outline-level="4"><text:soft-page-break/><text:tab/><text:tab/><text:span text:style-name="T50">Analyse</text:span><text:span text:style-name="T51"> :</text:span></text:h>
      <text:p text:style-name="P10"><text:s text:c="2"/><text:span text:style-name="T69">Accès à toutes les données : </text:span><text:span text:style-name="T70">nombres de visiteurs, le nombre d’utilisateurs etc.</text:span></text:p>
      <text:p text:style-name="P11">peut faire tous de même que les modérateurs et rédacteurs</text:p>
      <text:p text:style-name="Horizontal_20_Line"/>
      <text:h text:style-name="P26" text:outline-level="2" text:is-list-header="true">4. <text:span text:style-name="T28">Stack </text:span><text:span text:style-name="T52">envisagée</text:span></text:h>
      <text:h text:style-name="P38" text:outline-level="3"><text:tab/><text:span text:style-name="T71">a. Frontend web</text:span><text:span text:style-name="T72"/></text:h>
      <text:p text:style-name="P18"><text:tab/><text:tab/><text:span text:style-name="T28">Core Framework :</text:span></text:p>
      <text:p text:style-name="P7"><text:tab/><text:tab/><text:tab/>- React 18 + TypeScript</text:p>
      <text:p text:style-name="P7"><text:tab/><text:tab/><text:tab/>- Next.js 14</text:p>
      <text:p text:style-name="P7"><text:tab/><text:tab/><text:tab/>- Tailwind CSS + Headless UI</text:p>
      <text:p text:style-name="P7"><text:tab/><text:tab/>State Management :</text:p>
      <text:p text:style-name="P7"><text:tab/><text:tab/><text:tab/>- Zustand</text:p>
      <text:p text:style-name="P7"><text:tab/><text:tab/><text:tab/>- TanStack Query</text:p>
      <text:p text:style-name="P7"><text:tab/><text:tab/><text:tab/>- React Hook Form</text:p>
      <text:p text:style-name="P7"><text:tab/><text:tab/>UI Components :</text:p>
      <text:p text:style-name="P7"><text:tab/><text:tab/><text:tab/>- Radix UI</text:p>
      <text:p text:style-name="P7"><text:tab/><text:tab/><text:tab/>- Lucide React</text:p>
      <text:p text:style-name="P7"><text:tab/><text:tab/><text:tab/>- Framer Motion</text:p>
      <text:h text:style-name="P35" text:outline-level="3"><text:tab/><text:span text:style-name="T71">b. Backend</text:span></text:h>
      <text:p text:style-name="P6"><text:tab/><text:tab/><text:span text:style-name="T10">Server &amp; API :</text:span></text:p>
      <text:p text:style-name="P7"><text:tab/><text:tab/><text:tab/>- Node.js + Express</text:p>
      <text:p text:style-name="P7"><text:tab/><text:tab/><text:tab/>- TypeScript</text:p>
      <text:p text:style-name="Text_20_body"><text:span text:style-name="T71"><text:tab/><text:tab/></text:span><text:span text:style-name="T28">Authentification</text:span> :</text:p>
      <text:p text:style-name="P7"><text:tab/><text:tab/><text:tab/>- JWT + Refresh Tokens</text:p>
      <text:p text:style-name="P7"><text:tab/><text:tab/><text:tab/>- bcrypt</text:p>
      <text:p text:style-name="P7"><text:tab/><text:tab/><text:tab/>- express-rate-limit</text:p>
      <text:p text:style-name="Text_20_body"><text:tab/><text:tab/><text:span text:style-name="T53">Base de données :</text:span></text:p>
      <text:p text:style-name="P12"><text:tab/><text:tab/><text:tab/>- Supabase <text:span text:style-name="T73">(</text:span>PostgreSQL<text:span text:style-name="T73">)</text:span></text:p>
      <text:p text:style-name="Horizontal_20_Line"/>
      <text:h text:style-name="P27" text:outline-level="2" text:is-list-header="true"><text:soft-page-break/><text:span text:style-name="T74">5</text:span><text:span text:style-name="T71">. </text:span><text:span text:style-name="T54">Hébergement</text:span></text:h>
      <text:list text:style-name="L17">
        <text:list-item>
          <text:p text:style-name="P84"><text:span text:style-name="T54">Régistrat de nom de domaine :</text:span><text:span text:style-name="T76"> </text:span><text:span text:style-name="T77">LWS (Ligne Web Services)</text:span><text:span text:style-name="T75"> </text:span></text:p>
          <text:p text:style-name="P85"><text:span text:style-name="T39"><text:s text:c="2"/></text:span><text:span text:style-name="T40">Nom de domaine : </text:span><text:span text:style-name="T46">csm-</text:span><text:span text:style-name="T47">niangon.com </text:span><text:span text:style-name="T48">(6,99 </text:span><text:span text:style-name="T80">€</text:span> <text:span text:style-name="T48"><text:s/>1</text:span><text:span text:style-name="T81">er</text:span><text:span text:style-name="T48"> année, puis 9,99 </text:span><text:span text:style-name="T80">€</text:span> <text:s/><text:span text:style-name="T55">soit </text:span><text:span text:style-name="T78">4.</text:span><text:span text:style-name="T79">600 </text:span><text:span text:style-name="T78">Franc CFA</text:span><text:span text:style-name="T34"> <text:s/></text:span><text:span text:style-name="T35">et <text:s/>6.</text:span><text:span text:style-name="T79">600 Franc CFA)</text:span></text:p>
        </text:list-item>
      </text:list>
      <text:list text:style-name="L18">
        <text:list-item>
          <text:p text:style-name="P86"><text:span text:style-name="T49">Hébergement frontend : </text:span><text:span text:style-name="T39">Vercel</text:span></text:p>
        </text:list-item>
        <text:list-item>
          <text:p text:style-name="P70">Hébergement backend : <text:span text:style-name="T14">Render</text:span></text:p>
        </text:list-item>
      </text:list>
      <text:h text:style-name="P27" text:outline-level="2" text:is-list-header="true"><text:span text:style-name="T74">6. </text:span><text:span text:style-name="T82">Wireframe</text:span><text:span text:style-name="T74"> et Design UI</text:span></text:h>
      <text:h text:style-name="P36" text:outline-level="3"><text:s text:c="2"/>Wireframe</text:h>
      <text:h text:style-name="P37" text:outline-level="3" text:is-list-header="true"><text:tab/>Auth pages</text:h>
      <text:p text:style-name="P19"><draw:frame text:anchor-type="paragraph" draw:z-index="3" draw:name="Cadre de texte 3" draw:style-name="gr1" draw:text-style-name="P89" svg:width="1.763cm" svg:height="0.696cm" svg:x="9.73cm" svg:y="0.462cm"><draw:text-box><text:p text:style-name="P87"><text:span text:style-name="T85">Log in</text:span></text:p></draw:text-box></draw:frame><draw:frame text:anchor-type="paragraph" draw:z-index="2" draw:name="Cadre de texte 1" draw:style-name="gr2" draw:text-style-name="P89" svg:width="1.763cm" svg:height="0.696cm" svg:x="2.619cm" svg:y="0.462cm"><draw:text-box><text:p text:style-name="P87"><text:span text:style-name="T85">Sign </text:span><text:span text:style-name="T86">up</text:span></text:p></draw:text-box></draw:frame><text:s text:c="8"/><draw:frame draw:style-name="fr2" draw:name="Image1" text:anchor-type="char" svg:x="2.618cm" svg:y="1.157cm" svg:width="4.849cm" svg:height="10.583cm" draw:z-index="0"><draw:image xlink:href="Pictures/10000001000001D6000004026E6EF508.png" xlink:type="simple" xlink:show="embed" xlink:actuate="onLoad" draw:mime-type="image/png"/></draw:frame><draw:frame draw:style-name="fr2" draw:name="Image1 Copie 1" text:anchor-type="char" svg:x="9.73cm" svg:y="1.157cm" svg:width="4.849cm" svg:height="10.58cm" draw:z-index="1"><draw:image xlink:href="Pictures/10000001000001D600000402AEC24C11.png" xlink:type="simple" xlink:show="embed" xlink:actuate="onLoad" draw:mime-type="image/png"/></draw:frame></text:p>
      <text:p text:style-name="P19"><text:s text:c="17"/></text:p>
      <text:p text:style-name="P13"/>
      <text:p text:style-name="P13"/>
      <text:p text:style-name="P13"><draw:frame text:anchor-type="paragraph" draw:z-index="7" draw:name="Cadre de texte 4" draw:style-name="gr1" draw:text-style-name="P89" svg:width="4cm" svg:height="0.696cm" svg:x="9.73cm" svg:y="0.071cm"><draw:text-box><text:p text:style-name="P87"><text:span text:style-name="T85">Admins Log in</text:span></text:p></draw:text-box></draw:frame><draw:frame text:anchor-type="paragraph" draw:z-index="6" draw:name="Cadre de texte 2" draw:style-name="gr3" draw:text-style-name="P89" svg:width="3.299cm" svg:height="0.835cm" svg:x="2.618cm" svg:y="0.065cm"><draw:text-box><text:p text:style-name="P90"><text:span text:style-name="T85">Admins Sign up</text:span></text:p></draw:text-box></draw:frame><draw:frame draw:style-name="fr2" draw:name="Image1 Copie 2" text:anchor-type="char" svg:x="2.618cm" svg:y="0.9cm" svg:width="4.849cm" svg:height="10.583cm" draw:z-index="4"><draw:image xlink:href="Pictures/10000001000001D6000004024EA15E49.png" xlink:type="simple" xlink:show="embed" xlink:actuate="onLoad" draw:mime-type="image/png"/></draw:frame><draw:frame draw:style-name="fr2" draw:name="Image2" text:anchor-type="char" svg:x="9.73cm" svg:y="0.9cm" svg:width="4.851cm" svg:height="10.58cm" draw:z-index="5"><draw:image xlink:href="Pictures/10000001000001D6000004027EE2BC46.png" xlink:type="simple" xlink:show="embed" xlink:actuate="onLoad" draw:mime-type="image/png"/></draw:frame><text:soft-page-break/></text:p>
      <text:p text:style-name="P16"><draw:frame text:anchor-type="paragraph" draw:z-index="8" draw:name="Cadre de texte 5" draw:style-name="gr2" draw:text-style-name="P88" svg:width="2.454cm" svg:height="0.696cm" svg:x="2.619cm" svg:y="0.78cm"><draw:text-box><text:p text:style-name="P87"><text:span text:style-name="T85">User Profile</text:span></text:p></draw:text-box></draw:frame><text:span text:style-name="T84"><text:tab/>P</text:span>rofil p<draw:frame draw:style-name="fr3" draw:name="Image3" text:anchor-type="char" svg:x="2.619cm" svg:y="1.475cm" svg:width="4.851cm" svg:height="10.58cm" draw:z-index="9"><draw:image xlink:href="Pictures/10000001000001D6000004028409D2BC.png" xlink:type="simple" xlink:show="embed" xlink:actuate="onLoad" draw:mime-type="image/png"/></draw:frame>ages</text:p>
      <text:p text:style-name="P14"><draw:frame text:anchor-type="paragraph" draw:z-index="11" draw:name="Cadre de texte 6" draw:style-name="gr2" draw:text-style-name="P88" svg:width="2.454cm" svg:height="0.696cm" svg:x="9.73cm" svg:y="-0.002cm"><draw:text-box><text:p text:style-name="P87"><text:span text:style-name="T85">Mod Profile</text:span></text:p></draw:text-box></draw:frame><text:s text:c="33"/><draw:frame draw:style-name="fr3" draw:name="Image4" text:anchor-type="char" svg:x="9.73cm" svg:y="0.693cm" svg:width="4.851cm" svg:height="10.58cm" draw:z-index="10"><draw:image xlink:href="Pictures/10000001000001D60000040255AC7A47.png" xlink:type="simple" xlink:show="embed" xlink:actuate="onLoad" draw:mime-type="image/png"/></draw:frame></text:p>
      <text:p text:style-name="P14"><text:s text:c="70"/></text:p>
      <text:p text:style-name="P20"><draw:frame text:anchor-type="paragraph" draw:z-index="13" draw:name="Cadre de texte 7" draw:style-name="gr1" draw:text-style-name="P88" svg:width="2.454cm" svg:height="0.696cm" svg:x="5.943cm" svg:y="-0.233cm"><draw:text-box><text:p text:style-name="P87"><text:span text:style-name="T85">User Profile</text:span></text:p></draw:text-box></draw:frame><text:soft-page-break/><text:s text:c="50"/><draw:frame draw:style-name="fr2" draw:name="Image5" text:anchor-type="char" svg:x="5.943cm" svg:y="0.462cm" svg:width="4.851cm" svg:height="10.58cm" draw:z-index="12"><draw:image xlink:href="Pictures/10000001000001D600000402B13D18F1.png" xlink:type="simple" xlink:show="embed" xlink:actuate="onLoad" draw:mime-type="image/png"/></draw:frame></text:p>
      <text:p text:style-name="P22"><draw:frame text:anchor-type="paragraph" draw:z-index="15" draw:name="Cadre de texte 8" draw:style-name="gr1" draw:text-style-name="P88" svg:width="4.823cm" svg:height="0.696cm" svg:x="2.619cm" svg:y="-0.226cm"><draw:text-box><text:p text:style-name="P87"><text:span text:style-name="T85">Editer User Profile</text:span></text:p></draw:text-box></draw:frame><draw:frame text:anchor-type="paragraph" draw:z-index="17" draw:name="Cadre de texte 9" draw:style-name="gr1" draw:text-style-name="P88" svg:width="4.823cm" svg:height="0.696cm" svg:x="9.756cm" svg:y="-0.226cm"><draw:text-box><text:p text:style-name="P87"><text:span text:style-name="T85">Editer Mod </text:span><text:span text:style-name="T85">Profile</text:span></text:p></draw:text-box></draw:frame><draw:frame draw:style-name="fr2" draw:name="Image6" text:anchor-type="char" svg:x="2.619cm" svg:y="0.469cm" svg:width="4.851cm" svg:height="10.58cm" draw:z-index="14"><draw:image xlink:href="Pictures/10000001000001D600000402B2C3EA18.png" xlink:type="simple" xlink:show="embed" xlink:actuate="onLoad" draw:mime-type="image/png"/></draw:frame><draw:frame draw:style-name="fr3" draw:name="Image7" text:anchor-type="char" svg:x="9.73cm" svg:y="0.469cm" svg:width="4.851cm" svg:height="10.58cm" draw:z-index="16"><draw:image xlink:href="Pictures/10000001000001D600000402AB596B25.png" xlink:type="simple" xlink:show="embed" xlink:actuate="onLoad" draw:mime-type="image/png"/></draw:frame></text:p>
      <text:p text:style-name="P20"><draw:frame text:anchor-type="paragraph" draw:z-index="19" draw:name="Cadre de texte 10" draw:style-name="gr1" draw:text-style-name="P88" svg:width="4.823cm" svg:height="0.696cm" svg:x="5.969cm" svg:y="-0.233cm"><draw:text-box><text:p text:style-name="P87"><text:span text:style-name="T85">Editer Writer </text:span><text:span text:style-name="T85">Profile</text:span></text:p></draw:text-box></draw:frame><text:soft-page-break/><text:s text:c="65"/><draw:frame draw:style-name="fr2" draw:name="Image5 Copie 1" text:anchor-type="char" svg:x="5.969cm" svg:y="0.462cm" svg:width="4.851cm" svg:height="10.58cm" draw:z-index="18"><draw:image xlink:href="Pictures/10000001000001D600000402F59EAF63.png" xlink:type="simple" xlink:show="embed" xlink:actuate="onLoad" draw:mime-type="image/png"/></draw:frame></text:p>
      <text:p text:style-name="P21"><text:span text:style-name="T41"><text:tab/></text:span><text:span text:style-name="T42">Main</text:span><text:span text:style-name="T43"> p</text:span><text:span text:style-name="T41">ages</text:span></text:p>
      <text:p text:style-name="P15"><draw:frame text:anchor-type="paragraph" draw:z-index="21" draw:name="Cadre de texte 11" draw:style-name="gr1" draw:text-style-name="P88" svg:width="4.823cm" svg:height="0.696cm" svg:x="2.646cm" svg:y="0.191cm"><draw:text-box><text:p text:style-name="P87"><text:span text:style-name="T85">Home Page</text:span></text:p></draw:text-box></draw:frame><draw:frame text:anchor-type="paragraph" draw:z-index="23" draw:name="Cadre de texte 12" draw:style-name="gr1" draw:text-style-name="P88" svg:width="4.823cm" svg:height="0.696cm" svg:x="9.73cm" svg:y="0.196cm"><draw:text-box><text:p text:style-name="P87"><text:span text:style-name="T85">Actu Page</text:span></text:p></draw:text-box></draw:frame><draw:frame draw:style-name="fr2" draw:name="Image6 Copie 1" text:anchor-type="char" svg:x="2.646cm" svg:y="0.885cm" svg:width="4.851cm" svg:height="10.58cm" draw:z-index="20"><draw:image xlink:href="Pictures/10000001000001D60000040213977830.png" xlink:type="simple" xlink:show="embed" xlink:actuate="onLoad" draw:mime-type="image/png"/></draw:frame><draw:frame draw:style-name="fr2" draw:name="Image6 Copie 1 Copie 1" text:anchor-type="char" svg:x="9.73cm" svg:y="0.891cm" svg:width="4.851cm" svg:height="10.58cm" draw:z-index="22"><draw:image xlink:href="Pictures/10000001000001D600000402319DC4AF.png" xlink:type="simple" xlink:show="embed" xlink:actuate="onLoad" draw:mime-type="image/png"/></draw:frame><text:s text:c="145"/></text:p>
      <text:p text:style-name="P15"><draw:frame text:anchor-type="paragraph" draw:z-index="25" draw:name="Cadre de texte 13" draw:style-name="gr1" draw:text-style-name="P88" svg:width="4.823cm" svg:height="0.696cm" svg:x="1.707cm" svg:y="0.734cm"><draw:text-box><text:p text:style-name="P87"><text:span text:style-name="T85">Writer Post page</text:span></text:p></draw:text-box></draw:frame><draw:frame text:anchor-type="paragraph" draw:z-index="27" draw:name="Cadre de texte 14" draw:style-name="gr1" draw:text-style-name="P88" svg:width="4.823cm" svg:height="0.696cm" svg:x="10.149cm" svg:y="0.736cm"><draw:text-box><text:p text:style-name="P87"><text:span text:style-name="T85">Post viewer</text:span></text:p></draw:text-box></draw:frame><draw:frame draw:style-name="fr1" draw:name="Image8" text:anchor-type="char" svg:x="1.707cm" svg:y="1.429cm" svg:width="5.704cm" svg:height="23.278cm" draw:z-index="24"><draw:image xlink:href="Pictures/10000001000001D60000077E540A7A10.png" xlink:type="simple" xlink:show="embed" xlink:actuate="onLoad" draw:mime-type="image/png"/></draw:frame><text:soft-page-break/><text:tab/><text:span text:style-name="T83">Publication page</text:span><draw:frame draw:style-name="fr1" draw:name="Image9" text:anchor-type="char" svg:x="10.149cm" svg:y="1.431cm" svg:width="5.704cm" svg:height="17.417cm" draw:z-index="26"><draw:image xlink:href="Pictures/10000001000001D60000059BF407F608.png" xlink:type="simple" xlink:show="embed" xlink:actuate="onLoad" draw:mime-type="image/png"/></draw:frame>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variant="small-caps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charset="x-symbol" fo:font-weight="bold" style:font-name-asian="OpenSymbol1" style:font-family-asian="OpenSymbol" style:font-charset-asian="x-symbol" style:font-weight-asian="bold" style:font-name-complex="OpenSymbol1" style:font-family-complex="OpenSymbol" style:font-charset-complex="x-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svg:width="2.071cm" fo:min-height="0.041cm"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 Copie 1 Copie 1"/><text:page-number text:select-page="current">11</text:page-number><text:bookmark-end text:name="PageNumWizard_FOOTER_Style de page par défaut1 Copie 1 Copie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0:45:51.244799800</meta:creation-date>
    <dc:date>2025-11-18T20:53:48.153561017</dc:date>
    <meta:editing-duration>P1DT8H43M23S</meta:editing-duration>
    <meta:editing-cycles>41</meta:editing-cycles>
    <meta:generator>LibreOffice/24.2.7.2$Linux_X86_64 LibreOffice_project/420$Build-2</meta:generator>
    <meta:print-date>2025-11-08T16:21:13.856691700</meta:print-date>
    <meta:printed-by>Fichiers PDF</meta:printed-by>
    <dc:publisher>Mobio Israel</dc:publisher>
    <dc:type>Cahier de charge</dc:type>
    <dc:title>Cahier de Charge de l’Application de Media du Club NTIC et Information</dc:title>
    <meta:document-statistic meta:table-count="0" meta:image-count="14" meta:object-count="0" meta:page-count="11" meta:paragraph-count="155" meta:word-count="691" meta:character-count="4617" meta:non-whitespace-character-count="3580"/>
  </office:meta>
</office:document-meta>
</file>